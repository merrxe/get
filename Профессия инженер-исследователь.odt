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0AB00000129C6E779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.499cm" style:contextual-spacing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Заголовок_20_1_20_без_20_номера">
      <style:paragraph-properties fo:break-before="page"/>
      <style:text-properties officeooo:rsid="001c7ffe" officeooo:paragraph-rsid="001c7ffe"/>
    </style:style>
    <style:style style:name="P7" style:family="paragraph" style:parent-style-name="Text_20_body">
      <style:paragraph-properties fo:margin-top="0cm" fo:margin-bottom="0.499cm" style:contextual-spacing="false"/>
      <style:text-properties officeooo:paragraph-rsid="001c7ff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officeooo:rsid="00239790" officeooo:paragraph-rsid="00239790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Drawing">
      <style:paragraph-properties fo:margin-left="0cm" fo:text-indent="0cm" style:auto-text-indent="false"/>
      <style:text-properties officeooo:rsid="002a1be4" officeooo:paragraph-rsid="002a1be4"/>
    </style:style>
    <style:style style:name="P16" style:family="paragraph" style:parent-style-name="Drawing">
      <style:paragraph-properties fo:margin-left="0cm" fo:text-indent="0cm" style:auto-text-indent="false"/>
      <style:text-properties officeooo:paragraph-rsid="002a1be4"/>
    </style:style>
    <style:style style:name="P17" style:family="paragraph" style:parent-style-name="Drawing">
      <style:paragraph-properties fo:margin-left="0cm" fo:text-indent="0cm" style:auto-text-indent="false"/>
      <style:text-properties officeooo:paragraph-rsid="00283a8e"/>
    </style:style>
    <style:style style:name="P18" style:family="paragraph" style:parent-style-name="Заголовок_20_1_20_без_20_номера">
      <style:text-properties fo:language="ru" fo:country="RU" officeooo:rsid="001cd123" officeooo:paragraph-rsid="001cd12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rame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498_2133601836" office:name="ВВЕДЕНИЕ" text:style-name="Index_20_Link" text:visited-style-name="Index_20_Link">ВВЕДЕНИЕ<text:tab/>3</text:a></text:p>
          <text:p text:style-name="P3"><text:a xlink:type="simple" xlink:href="#__RefHeading___Toc8_2133601836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4"><text:a xlink:type="simple" xlink:href="#__RefHeading___Toc10_2133601836" office:name="Экспериментальные исследования" text:style-name="Index_20_Link" text:visited-style-name="Index_20_Link">1.1 Экспериментальные исследования<text:tab/>4</text:a></text:p>
          <text:p text:style-name="P5"><text:a xlink:type="simple" xlink:href="#__RefHeading___Toc12_2133601836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5"><text:a xlink:type="simple" xlink:href="#__RefHeading___Toc14_2133601836" office:name="Сбор данных" text:style-name="Index_20_Link" text:visited-style-name="Index_20_Link">1.1.2 Сбор данных<text:tab/>4</text:a></text:p>
          <text:p text:style-name="P4"><text:a xlink:type="simple" xlink:href="#__RefHeading___Toc16_2133601836" office:name="Анализ данных" text:style-name="Index_20_Link" text:visited-style-name="Index_20_Link">1.2 Анализ данных<text:tab/>4</text:a></text:p>
          <text:p text:style-name="P5"><text:a xlink:type="simple" xlink:href="#__RefHeading___Toc18_2133601836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5"><text:a xlink:type="simple" xlink:href="#__RefHeading___Toc20_2133601836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4"><text:a xlink:type="simple" xlink:href="#__RefHeading___Toc22_2133601836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5"><text:a xlink:type="simple" xlink:href="#__RefHeading___Toc24_2133601836" office:name="Создание прототипов" text:style-name="Index_20_Link" text:visited-style-name="Index_20_Link">1.3.1 Создание прототипов<text:tab/>4</text:a></text:p>
          <text:p text:style-name="P5"><text:a xlink:type="simple" xlink:href="#__RefHeading___Toc26_2133601836" office:name="Тестирование прототипов" text:style-name="Index_20_Link" text:visited-style-name="Index_20_Link">1.3.2 Тестирование прототипов<text:tab/>5</text:a></text:p>
          <text:p text:style-name="P5"><text:a xlink:type="simple" xlink:href="#__RefHeading___Toc28_2133601836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5"><text:a xlink:type="simple" xlink:href="#__RefHeading___Toc30_2133601836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5"><text:a xlink:type="simple" xlink:href="#__RefHeading___Toc32_2133601836" office:name="Публикация результатов" text:style-name="Index_20_Link" text:visited-style-name="Index_20_Link">1.3.5 Публикация результатов<text:tab/>5</text:a></text:p>
          <text:p text:style-name="P4"><text:a xlink:type="simple" xlink:href="#__RefHeading___Toc34_2133601836" office:name="Сотрудничество" text:style-name="Index_20_Link" text:visited-style-name="Index_20_Link">1.4 Сотрудничество<text:tab/>5</text:a></text:p>
          <text:p text:style-name="P5"><text:a xlink:type="simple" xlink:href="#__RefHeading___Toc36_2133601836" office:name="Работа в команде" text:style-name="Index_20_Link" text:visited-style-name="Index_20_Link">1.4.1 Работа в команде<text:tab/>5</text:a></text:p>
          <text:p text:style-name="P5"><text:a xlink:type="simple" xlink:href="#__RefHeading___Toc38_2133601836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3"><text:a xlink:type="simple" xlink:href="#__RefHeading___Toc281_2133601836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4"><text:a xlink:type="simple" xlink:href="#__RefHeading___Toc283_2133601836" office:name="Технические навыки" text:style-name="Index_20_Link" text:visited-style-name="Index_20_Link">2.1 Технические навыки<text:tab/>6</text:a></text:p>
          <text:p text:style-name="P4"><text:a xlink:type="simple" xlink:href="#__RefHeading___Toc285_2133601836" office:name="Личностные качества" text:style-name="Index_20_Link" text:visited-style-name="Index_20_Link">2.2 Личностные качества<text:tab/>6</text:a></text:p>
          <text:p text:style-name="P3"><text:a xlink:type="simple" xlink:href="#__RefHeading___Toc287_2133601836" office:name="Сферы применения" text:style-name="Index_20_Link" text:visited-style-name="Index_20_Link">3 Сферы применения<text:tab/>7</text:a></text:p>
          <text:p text:style-name="P4"><text:a xlink:type="simple" xlink:href="#__RefHeading___Toc289_2133601836" office:name="Роль в современном бизнесе" text:style-name="Index_20_Link" text:visited-style-name="Index_20_Link">3.1 Роль в современном бизнесе<text:tab/>7</text:a></text:p>
          <text:p text:style-name="P4"><text:a xlink:type="simple" xlink:href="#__RefHeading___Toc291_2133601836" office:name="Перспективы развития" text:style-name="Index_20_Link" text:visited-style-name="Index_20_Link">3.2 Перспективы развития<text:tab/>7</text:a></text:p>
          <text:p text:style-name="P3"><text:a xlink:type="simple" xlink:href="#__RefHeading___Toc293_2133601836" office:name="Требования к образованию" text:style-name="Index_20_Link" text:visited-style-name="Index_20_Link">4 Требования к образованию<text:tab/>8</text:a></text:p>
          <text:p text:style-name="P3"><text:a xlink:type="simple" xlink:href="#__RefHeading___Toc295_2133601836" office:name="ЗАКЛЮЧЕНИЕ" text:style-name="Index_20_Link" text:visited-style-name="Index_20_Link">ЗАКЛЮЧЕНИЕ<text:tab/>9</text:a></text:p>
        </text:index-body>
      </text:table-of-content>
      <text:p text:style-name="P1"/>
      <text:h text:style-name="P6" text:outline-level="1"><text:bookmark-start text:name="__RefHeading___Toc498_2133601836"/>ВВЕДЕНИЕ<text:bookmark-end text:name="__RefHeading___Toc498_2133601836"/></text:h>
      <text:p text:style-name="P7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8_2133601836"/>Основные направления деятельности<text:bookmark-end text:name="__RefHeading___Toc8_2133601836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0_2133601836"/>Экспериментальные исследования<text:bookmark-end text:name="__RefHeading___Toc10_2133601836"/></text:h>
      <text:h text:style-name="Heading_20_3" text:outline-level="3"><text:bookmark-start text:name="__RefHeading___Toc12_2133601836"/>Разработка и проведение экспериментов<text:bookmark-end text:name="__RefHeading___Toc12_2133601836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4_2133601836"/>Сбор данных<text:bookmark-end text:name="__RefHeading___Toc14_2133601836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_2133601836"/>Анализ данных<text:bookmark-end text:name="__RefHeading___Toc16_2133601836"/></text:h>
      <text:h text:style-name="Heading_20_3" text:outline-level="3"><text:bookmark-start text:name="__RefHeading___Toc18_2133601836"/>Обработка и интерпретация полученных данных<text:bookmark-end text:name="__RefHeading___Toc18_2133601836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_2133601836"/>Применение методов моделирования и симуляции<text:bookmark-end text:name="__RefHeading___Toc20_2133601836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2_2133601836"/>Разработка и тестирование прототипов<text:bookmark-end text:name="__RefHeading___Toc22_2133601836"/></text:h>
      <text:h text:style-name="Heading_20_3" text:outline-level="3"><text:bookmark-start text:name="__RefHeading___Toc24_2133601836"/>Создание прототипов<text:bookmark-end text:name="__RefHeading___Toc24_2133601836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6_2133601836"/>Тестирование прототипов<text:bookmark-end text:name="__RefHeading___Toc26_2133601836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8_2133601836"/>Подготовка отчётов и презентаций<text:bookmark-end text:name="__RefHeading___Toc28_2133601836"/></text:h>
      <text:h text:style-name="Heading_20_3" text:outline-level="3"><text:bookmark-start text:name="__RefHeading___Toc30_2133601836"/>Оформление результатов исследований<text:bookmark-end text:name="__RefHeading___Toc30_2133601836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2_2133601836"/>Публикация результатов<text:bookmark-end text:name="__RefHeading___Toc32_2133601836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4_2133601836"/>Сотрудничество<text:bookmark-end text:name="__RefHeading___Toc34_2133601836"/></text:h>
      <text:h text:style-name="Heading_20_3" text:outline-level="3"><text:bookmark-start text:name="__RefHeading___Toc36_2133601836"/>Работа в команде<text:bookmark-end text:name="__RefHeading___Toc36_2133601836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8_2133601836"/>Участие в междисциплинарных проектах<text:bookmark-end text:name="__RefHeading___Toc38_2133601836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81_2133601836"/>Ключевые компетенции специалиста<text:bookmark-end text:name="__RefHeading___Toc281_2133601836"/></text:h>
      <text:h text:style-name="Heading_20_2" text:outline-level="2"><text:bookmark-start text:name="__RefHeading___Toc283_2133601836"/>Технические навыки<text:bookmark-end text:name="__RefHeading___Toc283_2133601836"/></text:h>
      <text:list text:style-name="L1">
        <text:list-item>
          <text:p text:style-name="P8">Глубокие знания в профильной области</text:p>
        </text:list-item>
        <text:list-item>
          <text:p text:style-name="P8">Умение работать с современным оборудованием</text:p>
        </text:list-item>
        <text:list-item>
          <text:p text:style-name="P8">Навыки программирования</text:p>
        </text:list-item>
        <text:list-item>
          <text:p text:style-name="P8">Способность к математическому моделированию</text:p>
        </text:list-item>
      </text:list>
      <text:h text:style-name="Heading_20_2" text:outline-level="2"><text:bookmark-start text:name="__RefHeading___Toc285_2133601836"/>Личностные качества<text:bookmark-end text:name="__RefHeading___Toc285_2133601836"/></text:h>
      <text:list text:style-name="L2">
        <text:list-item>
          <text:p text:style-name="P9">Аналитическое мышление</text:p>
        </text:list-item>
        <text:list-item>
          <text:p text:style-name="P9">Способность к критическому анализу</text:p>
        </text:list-item>
        <text:list-item>
          <text:p text:style-name="P9">Гибкость мышления</text:p>
        </text:list-item>
        <text:list-item>
          <text:p text:style-name="P9">Коммуникабельность</text:p>
        </text:list-item>
        <text:list-item>
          <text:p text:style-name="P9">Стремление к постоянному обучению</text:p>
        </text:list-item>
      </text:list>
      <text:h text:style-name="Heading_20_2" text:outline-level="2">Профессионализм</text:h>
      <text:p text:style-name="P10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(1)</text:p>
      <text:p text:style-name="P10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287_2133601836"/>Сферы применения<text:bookmark-end text:name="__RefHeading___Toc287_2133601836"/></text:h>
      <text:p text:style-name="Text_20_body">Инженеры-исследователи востребованы в:</text:p>
      <text:list text:style-name="L3">
        <text:list-item>
          <text:p text:style-name="P11">Машиностроении</text:p>
        </text:list-item>
        <text:list-item>
          <text:p text:style-name="P11">Электронике</text:p>
        </text:list-item>
        <text:list-item>
          <text:p text:style-name="P11">Энергетике</text:p>
        </text:list-item>
        <text:list-item>
          <text:p text:style-name="P11">Биотехнологиях</text:p>
        </text:list-item>
        <text:list-item>
          <text:p text:style-name="P11">IT-индустрии</text:p>
        </text:list-item>
        <text:list-item>
          <text:p text:style-name="P11">Химической промышленности</text:p>
        </text:list-item>
      </text:list>
      <text:h text:style-name="Heading_20_2" text:outline-level="2"><text:bookmark-start text:name="__RefHeading___Toc289_2133601836"/>Роль в современном бизнесе<text:bookmark-end text:name="__RefHeading___Toc289_2133601836"/></text:h>
      <text:p text:style-name="Text_20_body">Преимущества для компании:</text:p>
      <text:list text:style-name="L4">
        <text:list-item>
          <text:p text:style-name="P12">Внедрение передовых технологий</text:p>
        </text:list-item>
        <text:list-item>
          <text:p text:style-name="P12">Оптимизация производственных процессов</text:p>
        </text:list-item>
        <text:list-item>
          <text:p text:style-name="P12">Разработка инновационных продуктов</text:p>
        </text:list-item>
        <text:list-item>
          <text:p text:style-name="P12">Снижение затрат</text:p>
        </text:list-item>
        <text:list-item>
          <text:p text:style-name="P12">Повышение конкурентоспособности</text:p>
        </text:list-item>
      </text:list>
      <text:h text:style-name="Heading_20_2" text:outline-level="2"><text:bookmark-start text:name="__RefHeading___Toc291_2133601836"/>Перспективы развития<text:bookmark-end text:name="__RefHeading___Toc291_2133601836"/></text:h>
      <text:p text:style-name="Text_20_body">Карьерный рост инженера-исследователя может включать:</text:p>
      <text:list text:style-name="L5">
        <text:list-item>
          <text:p text:style-name="P13">Руководящие позиции в отделах исследований и разработок</text:p>
        </text:list-item>
        <text:list-item>
          <text:p text:style-name="P13">Создание собственных исследовательских проектов</text:p>
        </text:list-item>
        <text:list-item>
          <text:p text:style-name="P13">Переход в академическую сферу</text:p>
        </text:list-item>
        <text:list-item>
          <text:p text:style-name="P13">Основание инновационных компаний</text:p>
        </text:list-item>
      </text:list>
      <text:h text:style-name="Heading_20_1" text:outline-level="1"><text:bookmark-start text:name="__RefHeading___Toc293_2133601836"/>Требования к образованию<text:bookmark-end text:name="__RefHeading___Toc293_2133601836"/></text:h>
      <text:p text:style-name="Text_20_body">Для работы инженером-исследователем необходимо:</text:p>
      <text:list xml:id="list1271141267" text:style-name="L6">
        <text:list-item>
          <text:p text:style-name="P14">Высшее техническое образование</text:p>
        </text:list-item>
        <text:list-item>
          <text:p text:style-name="P14">Магистратура или аспирантура</text:p>
        </text:list-item>
        <text:list-item>
          <text:p text:style-name="P14">Практический опыт в выбранной области</text:p>
        </text:list-item>
        <text:list-item>
          <text:p text:style-name="P14">Знание современных методов исследования</text:p>
        </text:list-item>
        <text:list-item>
          <text:p text:style-name="P14">Владение специализированным программным обеспечением</text:p>
        </text:list-item>
      </text:list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5"/>
      <text:p text:style-name="P16">Рисунок <text:sequence text:ref-name="refDrawing1" text:name="Drawing" text:formula="ooow:Drawing+1" style:num-format="1">1</text:sequence><text:s/>- Имя Фамилия, выпускник школы № Х и студент первого курса МФТИ, Физтех</text:p>
      <text:h text:style-name="Heading_20_2" text:outline-level="2">Люди</text:h>
      <text:list text:continue-numbering="true" text:style-name="L6">
        <text:list-header>
          <text:p text:style-name="P14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  </text:list-header>
      </text:list>
      <text:p text:style-name="абзац_20_рисунка"><draw:frame draw:style-name="fr2" draw:name="Изображение1" text:anchor-type="as-char" svg:width="4.521cm" svg:height="7.86cm" draw:z-index="1"><draw:image xlink:href="Pictures/10000001000000AB00000129C6E779F3.png" xlink:type="simple" xlink:show="embed" xlink:actuate="onLoad" draw:mime-type="image/png"/></draw:frame></text:p>
      <text:p text:style-name="P17">Рисунок <text:sequence text:ref-name="refDrawing0" text:name="Drawing" text:formula="ooow:Drawing+1" style:num-format="1">2</text:sequence><text:s/>- Имя Фамилия, выпускник школы № Х и студент первого курса МФТИ, Физтех</text:p>
      <text:h text:style-name="P18" text:outline-level="1"><text:bookmark-start text:name="__RefHeading___Toc295_2133601836"/>ЗАКЛЮЧЕНИЕ<text:bookmark-end text:name="__RefHeading___Toc295_2133601836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формулы" style:display-name="абзац формулы" style:family="paragraph" style:paren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абзац_20_рисунка" style:display-name="абзац рисунка" style:family="paragraph" style:parent-style-name="Standard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ние" style:family="paragraph" style:parent-style-name="List_20_1_20_Cont.">
      <style:paragraph-properties fo:margin-top="0cm" fo:margin-bottom="0cm" style:contextual-spacing="false" fo:line-height="100%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рисунок" style:family="paragraph" style:parent-style-name="List_20_1">
      <style:paragraph-properties fo:margin-top="0cm" fo:margin-bottom="0.49cm" style:contextual-spacing="false" fo:line-height="100%" fo:text-align="center" style:justify-single-word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5:37:20.950876400</meta:creation-date>
    <meta:generator>LibreOffice/26.2.2.2$Windows_X86_64 LibreOffice_project/1f77d10d6938fd34972958f64b2bcfa54f8b1ba5</meta:generator>
    <dc:date>2026-05-06T00:29:53.048955200</dc:date>
    <meta:editing-duration>PT9M2S</meta:editing-duration>
    <meta:editing-cycles>3</meta:editing-cycles>
    <meta:document-statistic meta:table-count="0" meta:image-count="1" meta:object-count="1" meta:page-count="10" meta:paragraph-count="110" meta:word-count="851" meta:character-count="6612" meta:non-whitespace-character-count="592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